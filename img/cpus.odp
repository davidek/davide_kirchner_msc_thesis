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2.594cm" fo:min-width="14.171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1.666cm" fo:min-width="3.728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077cm" fo:min-width="9.09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578cm" fo:min-width="3.72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6cm" fo:min-width="1.763cm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fo:min-height="1.983cm"/>
    </style:style>
    <style:style style:name="gr7" style:family="graphic" style:parent-style-name="standard">
      <style:graphic-properties draw:stroke="none" draw:fill="none" fo:min-height="0.978cm"/>
    </style:style>
    <style:style style:name="gr8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2.604cm" fo:min-width="14.178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1.677cm" fo:min-width="3.73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078cm" fo:min-width="9.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579cm" fo:min-width="3.724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61cm" fo:min-width="1.765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62cm" fo:min-width="1.765cm" fo:padding-top="0.165cm" fo:padding-bottom="0.165cm" fo:padding-left="0.29cm" fo:padding-right="0.29cm"/>
    </style:style>
    <style:style style:name="gr14" style:family="graphic" style:parent-style-name="standard">
      <style:graphic-properties draw:stroke="none" draw:fill="none" fo:min-height="1.984cm"/>
    </style:style>
    <style:style style:name="gr15" style:family="graphic" style:parent-style-name="standard">
      <style:graphic-properties draw:stroke="none" draw:fill="none" fo:min-height="0.979cm"/>
    </style:style>
    <style:style style:name="gr16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079cm" fo:min-width="9.1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578cm" fo:min-width="3.72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6cm" fo:min-width="1.765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077cm" fo:min-width="9.1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2.904cm" fo:min-width="14.449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1.819cm" fo:min-width="3.81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12cm" fo:min-width="9.169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614cm" fo:min-width="3.767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73cm" fo:min-width="1.783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74cm" fo:min-width="1.783cm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="none" fo:min-height="1.992cm"/>
    </style:style>
    <style:style style:name="gr27" style:family="graphic" style:parent-style-name="standard">
      <style:graphic-properties draw:stroke="none" draw:fill="none" fo:min-height="0.983cm"/>
    </style:style>
    <style:style style:name="gr28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121cm" fo:min-width="9.169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613cm" fo:min-width="3.767cm" fo:padding-top="0.165cm" fo:padding-bottom="0.165cm" fo:padding-left="0.29cm" fo:padding-right="0.29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Cambria"/>
    </style:style>
    <style:style style:name="P3" style:family="paragraph">
      <loext:graphic-properties draw:fill-color="#ffffff"/>
      <style:paragraph-properties fo:text-align="center"/>
      <style:text-properties style:font-name="Cambria"/>
    </style:style>
    <style:style style:name="P4" style:family="paragraph">
      <loext:graphic-properties draw:fill-color="#ffffff"/>
      <style:paragraph-properties fo:text-align="center"/>
      <style:text-properties style:font-name="Cambria" fo:font-size="22pt" style:font-size-asian="22pt" style:font-size-complex="22pt"/>
    </style:style>
    <style:style style:name="P5" style:family="paragraph">
      <style:paragraph-properties fo:text-align="end"/>
      <style:text-properties style:font-name="Cambria" fo:font-weight="bold" style:font-weight-asian="bold" style:font-weight-complex="bold"/>
    </style:style>
    <style:style style:name="P6" style:family="paragraph">
      <loext:graphic-properties draw:fill="none"/>
      <style:paragraph-properties fo:text-align="end"/>
      <style:text-properties style:font-name="Cambria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Cambria"/>
    </style:style>
    <style:style style:name="P8" style:family="paragraph">
      <loext:graphic-properties draw:fill-color="#ffffff"/>
    </style:style>
    <style:style style:name="T1" style:family="text">
      <style:text-properties style:font-name="Cambria" fo:font-size="36pt" style:font-size-asian="36pt" style:font-size-complex="36pt"/>
    </style:style>
    <style:style style:name="T2" style:family="text">
      <style:text-properties style:font-name="Cambria" fo:font-size="22pt" style:font-size-asian="22pt" style:font-size-complex="22pt"/>
    </style:style>
    <style:style style:name="T3" style:family="text">
      <style:text-properties style:font-name="Cambria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969cm" svg:height="23.142cm" svg:x="3.735cm" svg:y="5.315cm">
          <text:p/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372cm" svg:height="22.06cm" svg:x="14.032cm" svg:y="5.781cm">
          <text:p text:style-name="P2"><text:span text:style-name="T1">L3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9.71cm" svg:height="2.441cm" svg:x="4.06cm" svg:y="5.811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9.14cm" svg:y="6.011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6.54cm" svg:y="7.147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6.54cm" svg:y="6.028cm">
            <text:p text:style-name="P2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3.771cm" svg:y="5.828cm">
            <draw:text-box>
              <text:p text:style-name="P5"><text:span text:style-name="T3">0</text:span></text:p>
              <text:p text:style-name="P5"><text:span text:style-name="T3">16</text:span></text:p>
            </draw:text-box>
          </draw:frame>
          <draw:frame draw:style-name="gr7" draw:text-style-name="P7" draw:layer="layout" svg:width="2.881cm" svg:height="1.228cm" draw:transform="rotate (1.5707963267949) translate (5.303cm 8.509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4.06cm" svg:y="8.601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9.14cm" svg:y="8.801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6.54cm" svg:y="9.937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6.54cm" svg:y="8.818cm">
            <text:p text:style-name="P2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3.771cm" svg:y="8.618cm">
            <draw:text-box>
              <text:p text:style-name="P5"><text:span text:style-name="T3">2</text:span></text:p>
              <text:p text:style-name="P5"><text:span text:style-name="T3">18</text:span></text:p>
            </draw:text-box>
          </draw:frame>
          <draw:frame draw:style-name="gr7" draw:text-style-name="P7" draw:layer="layout" svg:width="2.881cm" svg:height="1.228cm" draw:transform="rotate (1.5707963267949) translate (5.303cm 11.299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4.06cm" svg:y="19.762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9.14cm" svg:y="19.962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6.54cm" svg:y="21.098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6.54cm" svg:y="19.979cm">
            <text:p text:style-name="P2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3.771cm" svg:y="19.779cm">
            <draw:text-box>
              <text:p text:style-name="P5"><text:span text:style-name="T3">10</text:span></text:p>
              <text:p text:style-name="P5"><text:span text:style-name="T3">26</text:span></text:p>
            </draw:text-box>
          </draw:frame>
          <draw:frame draw:style-name="gr7" draw:text-style-name="P7" draw:layer="layout" svg:width="2.881cm" svg:height="1.228cm" draw:transform="rotate (1.5707963267949) translate (5.303cm 22.46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4.06cm" svg:y="22.553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9.14cm" svg:y="22.753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6.54cm" svg:y="23.889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6.54cm" svg:y="22.77cm">
            <text:p text:style-name="P2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3.771cm" svg:y="22.57cm">
            <draw:text-box>
              <text:p text:style-name="P5"><text:span text:style-name="T3">12</text:span></text:p>
              <text:p text:style-name="P5"><text:span text:style-name="T3">28</text:span></text:p>
            </draw:text-box>
          </draw:frame>
          <draw:frame draw:style-name="gr7" draw:text-style-name="P7" draw:layer="layout" svg:width="2.881cm" svg:height="1.228cm" draw:transform="rotate (1.5707963267949) translate (5.303cm 25.251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4.06cm" svg:y="25.343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9.14cm" svg:y="25.543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6.54cm" svg:y="26.679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6.54cm" svg:y="25.56cm">
            <text:p text:style-name="P2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3.771cm" svg:y="25.36cm">
            <draw:text-box>
              <text:p text:style-name="P5"><text:span text:style-name="T3">14</text:span></text:p>
              <text:p text:style-name="P5"><text:span text:style-name="T3">30</text:span></text:p>
            </draw:text-box>
          </draw:frame>
          <draw:frame draw:style-name="gr7" draw:text-style-name="P7" draw:layer="layout" svg:width="2.881cm" svg:height="1.228cm" draw:transform="rotate (1.5707963267949) translate (5.303cm 28.041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4.06cm" svg:y="16.972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9.14cm" svg:y="17.172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6.54cm" svg:y="18.308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6.54cm" svg:y="17.189cm">
            <text:p text:style-name="P2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3.771cm" svg:y="16.989cm">
            <draw:text-box>
              <text:p text:style-name="P5"><text:span text:style-name="T3">8</text:span></text:p>
              <text:p text:style-name="P5"><text:span text:style-name="T3">24</text:span></text:p>
            </draw:text-box>
          </draw:frame>
          <draw:frame draw:style-name="gr7" draw:text-style-name="P7" draw:layer="layout" svg:width="2.881cm" svg:height="1.228cm" draw:transform="rotate (1.5707963267949) translate (5.303cm 19.67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4.06cm" svg:y="14.182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9.14cm" svg:y="14.382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6.54cm" svg:y="15.518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6.54cm" svg:y="14.399cm">
            <text:p text:style-name="P2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3.771cm" svg:y="14.199cm">
            <draw:text-box>
              <text:p text:style-name="P5"><text:span text:style-name="T3">6</text:span></text:p>
              <text:p text:style-name="P5"><text:span text:style-name="T3">22</text:span></text:p>
            </draw:text-box>
          </draw:frame>
          <draw:frame draw:style-name="gr7" draw:text-style-name="P7" draw:layer="layout" svg:width="2.881cm" svg:height="1.228cm" draw:transform="rotate (1.5707963267949) translate (5.303cm 16.88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4.06cm" svg:y="11.392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9.14cm" svg:y="11.592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6.54cm" svg:y="12.728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6.54cm" svg:y="11.609cm">
            <text:p text:style-name="P2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3.771cm" svg:y="11.409cm">
            <draw:text-box>
              <text:p text:style-name="P5"><text:span text:style-name="T3">4</text:span></text:p>
              <text:p text:style-name="P5"><text:span text:style-name="T3">20</text:span></text:p>
            </draw:text-box>
          </draw:frame>
          <draw:frame draw:style-name="gr7" draw:text-style-name="P7" draw:layer="layout" svg:width="2.881cm" svg:height="1.228cm" draw:transform="rotate (1.5707963267949) translate (5.303cm 14.09cm)">
            <draw:text-box>
              <text:p text:style-name="P2"><text:span text:style-name="T2">CPU</text:span></text:p>
            </draw:text-box>
          </draw:frame>
        </draw:g>
        <draw:g>
          <draw:custom-shape draw:style-name="gr8" draw:text-style-name="P1" draw:layer="layout" svg:width="14.976cm" svg:height="23.152cm" svg:x="3.74cm" svg:y="29.063cm">
            <text:p/>
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4.374cm" svg:height="22.071cm" svg:x="14.042cm" svg:y="29.528cm">
            <text:p text:style-name="P2"><text:span text:style-name="T1">L3</text:span></text:p>
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" draw:text-style-name="P1" draw:layer="layout" svg:width="9.714cm" svg:height="2.442cm" svg:x="4.065cm" svg:y="29.559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3" draw:layer="layout" svg:width="4.332cm" svg:height="1.937cm" svg:x="9.148cm" svg:y="29.759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3" draw:layer="layout" svg:width="2.355cm" svg:height="0.801cm" svg:x="6.546cm" svg:y="30.895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4" draw:layer="layout" svg:width="2.355cm" svg:height="0.802cm" svg:x="6.546cm" svg:y="29.775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4" draw:text-style-name="P6" draw:layer="layout" svg:width="1.765cm" svg:height="2.234cm" svg:x="3.776cm" svg:y="29.576cm">
              <draw:text-box>
                <text:p text:style-name="P5"><text:span text:style-name="T3">1</text:span></text:p>
                <text:p text:style-name="P5"><text:span text:style-name="T3">17</text:span></text:p>
              </draw:text-box>
            </draw:frame>
            <draw:frame draw:style-name="gr15" draw:text-style-name="P7" draw:layer="layout" svg:width="2.882cm" svg:height="1.229cm" draw:transform="rotate (1.5707963267949) translate (5.308cm 32.258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16" draw:text-style-name="P1" draw:layer="layout" svg:width="9.714cm" svg:height="2.443cm" svg:x="4.065cm" svg:y="32.35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" draw:layer="layout" svg:width="4.332cm" svg:height="1.936cm" svg:x="9.148cm" svg:y="32.551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3" draw:layer="layout" svg:width="2.355cm" svg:height="0.8cm" svg:x="6.546cm" svg:y="33.687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4" draw:layer="layout" svg:width="2.355cm" svg:height="0.8cm" svg:x="6.546cm" svg:y="32.568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4" draw:text-style-name="P6" draw:layer="layout" svg:width="1.765cm" svg:height="2.234cm" svg:x="3.776cm" svg:y="32.367cm">
              <draw:text-box>
                <text:p text:style-name="P5"><text:span text:style-name="T3">3</text:span></text:p>
                <text:p text:style-name="P5"><text:span text:style-name="T3">19</text:span></text:p>
              </draw:text-box>
            </draw:frame>
            <draw:frame draw:style-name="gr15" draw:text-style-name="P7" draw:layer="layout" svg:width="2.883cm" svg:height="1.229cm" draw:transform="rotate (1.5707963267949) translate (5.308cm 35.05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19" draw:text-style-name="P1" draw:layer="layout" svg:width="9.714cm" svg:height="2.441cm" svg:x="4.065cm" svg:y="43.517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3" draw:layer="layout" svg:width="4.332cm" svg:height="1.937cm" svg:x="9.148cm" svg:y="43.716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3" draw:layer="layout" svg:width="2.355cm" svg:height="0.8cm" svg:x="6.546cm" svg:y="44.853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4" draw:layer="layout" svg:width="2.355cm" svg:height="0.801cm" svg:x="6.546cm" svg:y="43.733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4" draw:text-style-name="P6" draw:layer="layout" svg:width="1.765cm" svg:height="2.234cm" svg:x="3.776cm" svg:y="43.534cm">
              <draw:text-box>
                <text:p text:style-name="P5"><text:span text:style-name="T3">11</text:span></text:p>
                <text:p text:style-name="P5"><text:span text:style-name="T3">27</text:span></text:p>
              </draw:text-box>
            </draw:frame>
            <draw:frame draw:style-name="gr15" draw:text-style-name="P7" draw:layer="layout" svg:width="2.882cm" svg:height="1.229cm" draw:transform="rotate (1.5707963267949) translate (5.308cm 46.215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19" draw:text-style-name="P1" draw:layer="layout" svg:width="9.714cm" svg:height="2.441cm" svg:x="4.065cm" svg:y="46.309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" draw:layer="layout" svg:width="4.332cm" svg:height="1.936cm" svg:x="9.148cm" svg:y="46.509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3" draw:layer="layout" svg:width="2.355cm" svg:height="0.8cm" svg:x="6.546cm" svg:y="47.645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4" draw:layer="layout" svg:width="2.355cm" svg:height="0.8cm" svg:x="6.546cm" svg:y="46.526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4" draw:text-style-name="P6" draw:layer="layout" svg:width="1.765cm" svg:height="2.234cm" svg:x="3.776cm" svg:y="46.326cm">
              <draw:text-box>
                <text:p text:style-name="P5"><text:span text:style-name="T3">13</text:span></text:p>
                <text:p text:style-name="P5"><text:span text:style-name="T3">29</text:span></text:p>
              </draw:text-box>
            </draw:frame>
            <draw:frame draw:style-name="gr15" draw:text-style-name="P7" draw:layer="layout" svg:width="2.882cm" svg:height="1.229cm" draw:transform="rotate (1.5707963267949) translate (5.308cm 49.008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10" draw:text-style-name="P1" draw:layer="layout" svg:width="9.714cm" svg:height="2.442cm" svg:x="4.065cm" svg:y="49.1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" draw:layer="layout" svg:width="4.332cm" svg:height="1.936cm" svg:x="9.148cm" svg:y="49.3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3" draw:layer="layout" svg:width="2.355cm" svg:height="0.8cm" svg:x="6.546cm" svg:y="50.436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4" draw:layer="layout" svg:width="2.355cm" svg:height="0.8cm" svg:x="6.546cm" svg:y="49.317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4" draw:text-style-name="P6" draw:layer="layout" svg:width="1.765cm" svg:height="2.234cm" svg:x="3.776cm" svg:y="49.117cm">
              <draw:text-box>
                <text:p text:style-name="P5"><text:span text:style-name="T3">15</text:span></text:p>
                <text:p text:style-name="P5"><text:span text:style-name="T3">31</text:span></text:p>
              </draw:text-box>
            </draw:frame>
            <draw:frame draw:style-name="gr15" draw:text-style-name="P7" draw:layer="layout" svg:width="2.883cm" svg:height="1.229cm" draw:transform="rotate (1.5707963267949) translate (5.308cm 51.8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10" draw:text-style-name="P1" draw:layer="layout" svg:width="9.714cm" svg:height="2.442cm" svg:x="4.065cm" svg:y="40.725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3" draw:layer="layout" svg:width="4.332cm" svg:height="1.937cm" svg:x="9.148cm" svg:y="40.925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3" draw:layer="layout" svg:width="2.355cm" svg:height="0.8cm" svg:x="6.546cm" svg:y="42.062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4" draw:layer="layout" svg:width="2.355cm" svg:height="0.8cm" svg:x="6.546cm" svg:y="40.942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4" draw:text-style-name="P6" draw:layer="layout" svg:width="1.765cm" svg:height="2.234cm" svg:x="3.776cm" svg:y="40.742cm">
              <draw:text-box>
                <text:p text:style-name="P5"><text:span text:style-name="T3">9</text:span></text:p>
                <text:p text:style-name="P5"><text:span text:style-name="T3">25</text:span></text:p>
              </draw:text-box>
            </draw:frame>
            <draw:frame draw:style-name="gr15" draw:text-style-name="P7" draw:layer="layout" svg:width="2.882cm" svg:height="1.229cm" draw:transform="rotate (1.5707963267949) translate (5.308cm 43.424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10" draw:text-style-name="P1" draw:layer="layout" svg:width="9.714cm" svg:height="2.442cm" svg:x="4.065cm" svg:y="37.934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3" draw:layer="layout" svg:width="4.332cm" svg:height="1.937cm" svg:x="9.148cm" svg:y="38.134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3" draw:layer="layout" svg:width="2.355cm" svg:height="0.8cm" svg:x="6.546cm" svg:y="39.271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4" draw:layer="layout" svg:width="2.355cm" svg:height="0.8cm" svg:x="6.546cm" svg:y="38.151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4" draw:text-style-name="P6" draw:layer="layout" svg:width="1.765cm" svg:height="2.234cm" svg:x="3.776cm" svg:y="37.951cm">
              <draw:text-box>
                <text:p text:style-name="P5"><text:span text:style-name="T3">7</text:span></text:p>
                <text:p text:style-name="P5"><text:span text:style-name="T3">23</text:span></text:p>
              </draw:text-box>
            </draw:frame>
            <draw:frame draw:style-name="gr15" draw:text-style-name="P7" draw:layer="layout" svg:width="2.883cm" svg:height="1.229cm" draw:transform="rotate (1.5707963267949) translate (5.308cm 40.633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16" draw:text-style-name="P1" draw:layer="layout" svg:width="9.714cm" svg:height="2.443cm" svg:x="4.065cm" svg:y="35.142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3" draw:layer="layout" svg:width="4.332cm" svg:height="1.937cm" svg:x="9.148cm" svg:y="35.343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3" draw:layer="layout" svg:width="2.355cm" svg:height="0.801cm" svg:x="6.546cm" svg:y="36.479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4" draw:layer="layout" svg:width="2.355cm" svg:height="0.8cm" svg:x="6.546cm" svg:y="35.36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4" draw:text-style-name="P6" draw:layer="layout" svg:width="1.765cm" svg:height="2.234cm" svg:x="3.776cm" svg:y="35.159cm">
              <draw:text-box>
                <text:p text:style-name="P5"><text:span text:style-name="T3">5</text:span></text:p>
                <text:p text:style-name="P5"><text:span text:style-name="T3">21</text:span></text:p>
              </draw:text-box>
            </draw:frame>
            <draw:frame draw:style-name="gr15" draw:text-style-name="P7" draw:layer="layout" svg:width="2.883cm" svg:height="1.229cm" draw:transform="rotate (1.5707963267949) translate (5.308cm 37.842cm)">
              <draw:text-box>
                <text:p text:style-name="P2"><text:span text:style-name="T2">CPU</text:span></text:p>
              </draw:text-box>
            </draw:frame>
          </draw:g>
        </draw:g>
        <draw:g>
          <draw:custom-shape draw:style-name="gr20" draw:text-style-name="P1" draw:layer="layout" svg:width="15.029cm" svg:height="23.234cm" svg:x="19.729cm" svg:y="5.249cm">
            <text:p/>
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3" draw:layer="layout" svg:width="4.39cm" svg:height="22.149cm" svg:x="20.031cm" svg:y="5.716cm">
            <text:p text:style-name="P2"><text:span text:style-name="T1">L3</text:span></text:p>
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2" draw:text-style-name="P1" draw:layer="layout" svg:width="9.749cm" svg:height="2.45cm" svg:x="24.683cm" svg:y="5.747cm">
              <text:p/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3" draw:layer="layout" svg:width="4.347cm" svg:height="1.944cm" svg:x="24.984cm" svg:y="5.947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3" draw:layer="layout" svg:width="2.363cm" svg:height="0.803cm" svg:x="29.579cm" svg:y="7.088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4" draw:layer="layout" svg:width="2.363cm" svg:height="0.804cm" svg:x="29.579cm" svg:y="5.964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tru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6" draw:text-style-name="P6" draw:layer="layout" svg:width="1.771cm" svg:height="2.242cm" svg:x="32.952cm" svg:y="5.764cm">
              <draw:text-box>
                <text:p text:style-name="P5"><text:span text:style-name="T3">1</text:span></text:p>
                <text:p text:style-name="P5"><text:span text:style-name="T3">17</text:span></text:p>
              </draw:text-box>
            </draw:frame>
            <draw:frame draw:style-name="gr27" draw:text-style-name="P7" draw:layer="layout" svg:width="2.892cm" svg:height="1.233cm" draw:transform="rotate (-1.5707963267949) translate (33.185cm 5.563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28" draw:text-style-name="P1" draw:layer="layout" svg:width="9.749cm" svg:height="2.451cm" svg:x="24.683cm" svg:y="8.548cm">
              <text:p/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3" draw:layer="layout" svg:width="4.347cm" svg:height="1.943cm" svg:x="24.984cm" svg:y="8.749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3" draw:layer="layout" svg:width="2.363cm" svg:height="0.803cm" svg:x="29.579cm" svg:y="9.889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4" draw:layer="layout" svg:width="2.363cm" svg:height="0.803cm" svg:x="29.579cm" svg:y="8.766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tru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6" draw:text-style-name="P6" draw:layer="layout" svg:width="1.771cm" svg:height="2.242cm" svg:x="32.952cm" svg:y="8.565cm">
              <draw:text-box>
                <text:p text:style-name="P5"><text:span text:style-name="T3">3</text:span></text:p>
                <text:p text:style-name="P5"><text:span text:style-name="T3">19</text:span></text:p>
              </draw:text-box>
            </draw:frame>
            <draw:frame draw:style-name="gr27" draw:text-style-name="P7" draw:layer="layout" svg:width="2.893cm" svg:height="1.233cm" draw:transform="rotate (-1.5707963267949) translate (33.185cm 8.364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22" draw:text-style-name="P1" draw:layer="layout" svg:width="9.749cm" svg:height="2.45cm" svg:x="24.683cm" svg:y="19.754cm">
              <text:p/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3" draw:layer="layout" svg:width="4.347cm" svg:height="1.944cm" svg:x="24.984cm" svg:y="19.954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3" draw:layer="layout" svg:width="2.363cm" svg:height="0.803cm" svg:x="29.579cm" svg:y="21.095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4" draw:layer="layout" svg:width="2.363cm" svg:height="0.804cm" svg:x="29.579cm" svg:y="19.971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tru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6" draw:text-style-name="P6" draw:layer="layout" svg:width="1.771cm" svg:height="2.242cm" svg:x="32.952cm" svg:y="19.771cm">
              <draw:text-box>
                <text:p text:style-name="P5"><text:span text:style-name="T3">11</text:span></text:p>
                <text:p text:style-name="P5"><text:span text:style-name="T3">27</text:span></text:p>
              </draw:text-box>
            </draw:frame>
            <draw:frame draw:style-name="gr27" draw:text-style-name="P7" draw:layer="layout" svg:width="2.892cm" svg:height="1.233cm" draw:transform="rotate (-1.5707963267949) translate (33.185cm 19.57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22" draw:text-style-name="P1" draw:layer="layout" svg:width="9.749cm" svg:height="2.45cm" svg:x="24.683cm" svg:y="22.556cm">
              <text:p/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3" draw:layer="layout" svg:width="4.347cm" svg:height="1.943cm" svg:x="24.984cm" svg:y="22.757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3" draw:layer="layout" svg:width="2.363cm" svg:height="0.803cm" svg:x="29.579cm" svg:y="23.897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4" draw:layer="layout" svg:width="2.363cm" svg:height="0.803cm" svg:x="29.579cm" svg:y="22.774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tru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6" draw:text-style-name="P6" draw:layer="layout" svg:width="1.771cm" svg:height="2.242cm" svg:x="32.952cm" svg:y="22.573cm">
              <draw:text-box>
                <text:p text:style-name="P5"><text:span text:style-name="T3">13</text:span></text:p>
                <text:p text:style-name="P5"><text:span text:style-name="T3">29</text:span></text:p>
              </draw:text-box>
            </draw:frame>
            <draw:frame draw:style-name="gr27" draw:text-style-name="P7" draw:layer="layout" svg:width="2.893cm" svg:height="1.233cm" draw:transform="rotate (-1.5707963267949) translate (33.185cm 22.372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28" draw:text-style-name="P1" draw:layer="layout" svg:width="9.749cm" svg:height="2.451cm" svg:x="24.683cm" svg:y="25.357cm">
              <text:p/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3" draw:layer="layout" svg:width="4.347cm" svg:height="1.943cm" svg:x="24.984cm" svg:y="25.558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3" draw:layer="layout" svg:width="2.363cm" svg:height="0.803cm" svg:x="29.579cm" svg:y="26.698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4" draw:layer="layout" svg:width="2.363cm" svg:height="0.803cm" svg:x="29.579cm" svg:y="25.575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tru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6" draw:text-style-name="P6" draw:layer="layout" svg:width="1.771cm" svg:height="2.242cm" svg:x="32.952cm" svg:y="25.374cm">
              <draw:text-box>
                <text:p text:style-name="P5"><text:span text:style-name="T3">15</text:span></text:p>
                <text:p text:style-name="P5"><text:span text:style-name="T3">31</text:span></text:p>
              </draw:text-box>
            </draw:frame>
            <draw:frame draw:style-name="gr27" draw:text-style-name="P7" draw:layer="layout" svg:width="2.893cm" svg:height="1.233cm" draw:transform="rotate (-1.5707963267949) translate (33.185cm 25.173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28" draw:text-style-name="P1" draw:layer="layout" svg:width="9.749cm" svg:height="2.451cm" svg:x="24.683cm" svg:y="16.952cm">
              <text:p/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3" draw:layer="layout" svg:width="4.347cm" svg:height="1.944cm" svg:x="24.984cm" svg:y="17.153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3" draw:layer="layout" svg:width="2.363cm" svg:height="0.803cm" svg:x="29.579cm" svg:y="18.294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4" draw:layer="layout" svg:width="2.363cm" svg:height="0.803cm" svg:x="29.579cm" svg:y="17.17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tru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6" draw:text-style-name="P6" draw:layer="layout" svg:width="1.771cm" svg:height="2.242cm" svg:x="32.952cm" svg:y="16.969cm">
              <draw:text-box>
                <text:p text:style-name="P5"><text:span text:style-name="T3">9</text:span></text:p>
                <text:p text:style-name="P5"><text:span text:style-name="T3">25</text:span></text:p>
              </draw:text-box>
            </draw:frame>
            <draw:frame draw:style-name="gr27" draw:text-style-name="P7" draw:layer="layout" svg:width="2.892cm" svg:height="1.233cm" draw:transform="rotate (-1.5707963267949) translate (33.185cm 16.769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28" draw:text-style-name="P1" draw:layer="layout" svg:width="9.749cm" svg:height="2.451cm" svg:x="24.683cm" svg:y="14.151cm">
              <text:p/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3" draw:layer="layout" svg:width="4.347cm" svg:height="1.944cm" svg:x="24.984cm" svg:y="14.352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3" draw:layer="layout" svg:width="2.363cm" svg:height="0.803cm" svg:x="29.579cm" svg:y="15.493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4" draw:layer="layout" svg:width="2.363cm" svg:height="0.803cm" svg:x="29.579cm" svg:y="14.369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tru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6" draw:text-style-name="P6" draw:layer="layout" svg:width="1.771cm" svg:height="2.242cm" svg:x="32.952cm" svg:y="14.168cm">
              <draw:text-box>
                <text:p text:style-name="P5"><text:span text:style-name="T3">7</text:span></text:p>
                <text:p text:style-name="P5"><text:span text:style-name="T3">23</text:span></text:p>
              </draw:text-box>
            </draw:frame>
            <draw:frame draw:style-name="gr27" draw:text-style-name="P7" draw:layer="layout" svg:width="2.893cm" svg:height="1.233cm" draw:transform="rotate (-1.5707963267949) translate (33.185cm 13.967cm)">
              <draw:text-box>
                <text:p text:style-name="P2"><text:span text:style-name="T2">CPU</text:span></text:p>
              </draw:text-box>
            </draw:frame>
          </draw:g>
          <draw:g>
            <draw:custom-shape draw:style-name="gr28" draw:text-style-name="P1" draw:layer="layout" svg:width="9.749cm" svg:height="2.451cm" svg:x="24.683cm" svg:y="11.35cm">
              <text:p/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3" draw:layer="layout" svg:width="4.347cm" svg:height="1.944cm" svg:x="24.984cm" svg:y="11.551cm">
              <text:p text:style-name="P2"><text:span text:style-name="T2">L2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3" draw:layer="layout" svg:width="2.363cm" svg:height="0.804cm" svg:x="29.579cm" svg:y="12.691cm">
              <text:p text:style-name="P2"><text:span text:style-name="T2">L1 D</text:span></text:p>
              <draw:enhanced-geometry svg:viewBox="0 0 21600 21600" draw:path-stretchpoint-x="10800" draw:path-stretchpoint-y="10800" draw:text-areas="?f3 ?f4 ?f5 ?f6" draw:mirror-horizontal="tru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4" draw:layer="layout" svg:width="2.363cm" svg:height="0.803cm" svg:x="29.579cm" svg:y="11.568cm">
              <text:p text:style-name="P2"><text:span text:style-name="T2">L1 I</text:span></text:p>
              <draw:enhanced-geometry svg:viewBox="0 0 21600 21600" draw:path-stretchpoint-x="10800" draw:path-stretchpoint-y="10800" draw:text-areas="?f3 ?f4 ?f5 ?f6" draw:mirror-horizontal="tru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6" draw:text-style-name="P6" draw:layer="layout" svg:width="1.771cm" svg:height="2.242cm" svg:x="32.952cm" svg:y="11.367cm">
              <draw:text-box>
                <text:p text:style-name="P5"><text:span text:style-name="T3">5</text:span></text:p>
                <text:p text:style-name="P5"><text:span text:style-name="T3">21</text:span></text:p>
              </draw:text-box>
            </draw:frame>
            <draw:frame draw:style-name="gr27" draw:text-style-name="P7" draw:layer="layout" svg:width="2.893cm" svg:height="1.233cm" draw:transform="rotate (-1.5707963267949) translate (33.185cm 11.166cm)">
              <draw:text-box>
                <text:p text:style-name="P2"><text:span text:style-name="T2">CPU</text:span></text:p>
              </draw:text-box>
            </draw:frame>
          </draw:g>
        </draw:g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6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87.300003051757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88cm" fo:margin-bottom="0cm" fo:text-indent="0cm"/>
      <style:text-properties fo:font-size="7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17cm" fo:margin-bottom="0cm" fo:text-indent="0cm"/>
      <style:text-properties fo:font-size="6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42cm" fo:margin-bottom="0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71cm" fo:margin-bottom="0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71cm" fo:margin-bottom="0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71cm" fo:margin-bottom="0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71cm" fo:margin-bottom="0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71cm" fo:margin-bottom="0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20.19999694824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35.998cm" svg:height="9.584cm" svg:x="3cm" svg:y="3.287cm" presentation:class="title" presentation:placeholder="true">
        <draw:text-box/>
      </draw:frame>
      <draw:frame presentation:style-name="Default-outline1" draw:layer="backgroundobjects" svg:width="35.998cm" svg:height="33.291cm" svg:x="3cm" svg:y="14.428cm" presentation:class="outline" presentation:placeholder="true">
        <draw:text-box/>
      </draw:frame>
      <draw:frame presentation:style-name="Mpr1" draw:text-style-name="MP2" draw:layer="backgroundobjects" svg:width="9.318cm" svg:height="3.958cm" svg:x="3cm" svg:y="53.28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678cm" svg:height="3.958cm" svg:x="14.679cm" svg:y="53.28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318cm" svg:height="3.958cm" svg:x="29.679cm" svg:y="53.28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1:47:41.608515298</meta:creation-date>
    <dc:date>2015-11-17T12:08:20.911736295</dc:date>
    <meta:editing-duration>PT5M18S</meta:editing-duration>
    <meta:editing-cycles>2</meta:editing-cycles>
    <meta:generator>LibreOffice/4.4.5.2$Linux_X86_64 LibreOffice_project/40m0$Build-2</meta:generator>
    <meta:document-statistic meta:object-count="199"/>
  </office:meta>
</office:document-meta>
</file>